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h text:style-name="Heading_20_1" text:outline-level="1"><text:bookmark-start text:name="intro"/>Intro<text:bookmark-end text:name="intro"/></text:h>
      <text:p text:style-name="Text_20_body">A <text:bookmark text:name="spot"/>marked word and a <text:reference-mark-start text:name="ref1"/>referenced<text:reference-mark-end text:name="ref1"/> 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