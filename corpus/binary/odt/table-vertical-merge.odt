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/>
  <office:body>
    <office:text>
      <table:table table:name="T1">
        <table:table-column table:number-columns-repeated="2"/>
        <table:table-row>
          <table:table-cell table:number-rows-spanned="2">
            <text:p text:style-name="Text_20_body">A</text:p>
          </table:table-cell>
          <table:table-cell>
            <text:p text:style-name="Text_20_body">B</text:p>
          </table:table-cell>
        </table:table-row>
        <table:table-row>
          <table:covered-table-cell/>
          <table:table-cell>
            <text:p text:style-name="Text_20_body">C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Preformatted_20_Text" style:display-name="Preformatted Text" style:family="paragraph" style:parent-style-name="Standard"/>
    <style:style style:name="Source_20_Text" style:display-name="Source Text" style:family="text"/>
  </office:styles>
</office:document-styles>
</file>