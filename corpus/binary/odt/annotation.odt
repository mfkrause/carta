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>
 </office:automatic-styles>
  <office:body>
    <office:text>
      <text:p text:style-name="Text_20_body">Before the <office:annotation office:name="__Annotation__1"><dc:creator>Reviewer</dc:creator><dc:date>2020-01-01T00:00:00</dc:date><text:p text:style-name="Text_20_body">A private remark.</text:p></office:annotation>note the text st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