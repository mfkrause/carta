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/>
  <office:body>
    <office:text>
      <text:p text:style-name="Text_20_body">Before<text:note text:note-class="footnote" text:id="ftn1"><text:note-citation>1</text:note-citation></text:note>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Preformatted_20_Text" style:display-name="Preformatted Text" style:family="paragraph" style:parent-style-name="Standard"/>
    <style:style style:name="Source_20_Text" style:display-name="Source Text" style:family="text"/>
  </office:styles>
</office:document-styles>
</file>