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Formula-0/" manifest:media-type="application/vnd.oasis.opendocument.formula"/>
  <manifest:file-entry manifest:full-path="Formula-0/content.xml" manifest:media-type="text/xml"/>
  <manifest:file-entry manifest:full-path="Formula-1/" manifest:media-type="application/vnd.oasis.opendocument.formula"/>
  <manifest:file-entry manifest:full-path="Formula-1/content.xml" manifest:media-type="text/xml"/>
  <manifest:file-entry manifest:full-path="Formula-2/" manifest:media-type="application/vnd.oasis.opendocument.formula"/>
  <manifest:file-entry manifest:full-path="Formula-2/content.xml" manifest:media-type="text/xml"/>
  <manifest:file-entry manifest:full-path="Formula-3/" manifest:media-type="application/vnd.oasis.opendocument.formula"/>
  <manifest:file-entry manifest:full-path="Formula-3/content.xml" manifest:media-type="text/xml"/>
  <manifest:file-entry manifest:full-path="Formula-4/" manifest:media-type="application/vnd.oasis.opendocument.formula"/>
  <manifest:file-entry manifest:full-path="Formula-4/content.xml" manifest:media-type="text/xml"/>
  <manifest:file-entry manifest:full-path="Formula-5/" manifest:media-type="application/vnd.oasis.opendocument.formula"/>
  <manifest:file-entry manifest:full-path="Formula-5/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xlink="http://www.w3.org/1999/xlink" office:version="1.3">
  <office:body>
    <office:text>
      <text:p text:style-name="Text_20_body"><draw:frame text:anchor-type="as-char" svg:width="1cm" svg:height="1cm"><draw:object xlink:href="./Formula-0"/></draw:frame></text:p>
      <text:p text:style-name="Text_20_body"><draw:frame text:anchor-type="as-char" svg:width="1cm" svg:height="1cm"><draw:object xlink:href="./Formula-1"/></draw:frame></text:p>
      <text:p text:style-name="Text_20_body"><draw:frame text:anchor-type="as-char" svg:width="1cm" svg:height="1cm"><draw:object xlink:href="./Formula-2"/></draw:frame></text:p>
      <text:p text:style-name="Text_20_body"><draw:frame text:anchor-type="as-char" svg:width="1cm" svg:height="1cm"><draw:object xlink:href="./Formula-3"/></draw:frame></text:p>
      <text:p text:style-name="Text_20_body"><draw:frame text:anchor-type="as-char" svg:width="1cm" svg:height="1cm"><draw:object xlink:href="./Formula-4"/></draw:frame></text:p>
      <text:p text:style-name="Text_20_body"><draw:frame text:anchor-type="as-char" svg:width="1cm" svg:height="1cm"><draw:object xlink:href="./Formula-5"/></draw:frame></text:p>
    </office:text>
  </office:body>
</office:document-content>
</file>

<file path=styles.xml><?xml version="1.0" encoding="utf-8"?>
<office:document-styles xmlns:office="urn:oasis:names:tc:opendocument:xmlns:office:1.0" office:version="1.3">
  <office:styles/>
</office:document-styles>
</file>

<file path=Formula-0/content.xml><?xml version="1.0" encoding="utf-8"?>
<math xmlns="http://www.w3.org/1998/Math/MathML" display="block">
  <mspace width="1em"/>
</math>
</file>

<file path=Formula-1/content.xml><?xml version="1.0" encoding="utf-8"?>
<math xmlns="http://www.w3.org/1998/Math/MathML" display="block">
  <mspace width="2em"/>
</math>
</file>

<file path=Formula-2/content.xml><?xml version="1.0" encoding="utf-8"?>
<math xmlns="http://www.w3.org/1998/Math/MathML" display="block">
  <mspace width="0.5em"/>
</math>
</file>

<file path=Formula-3/content.xml><?xml version="1.0" encoding="utf-8"?>
<math xmlns="http://www.w3.org/1998/Math/MathML" display="block">
  <mspace width="thinmathspace"/>
</math>
</file>

<file path=Formula-4/content.xml><?xml version="1.0" encoding="utf-8"?>
<math xmlns="http://www.w3.org/1998/Math/MathML" display="block">
  <mspace width="mediummathspace"/>
</math>
</file>

<file path=Formula-5/content.xml><?xml version="1.0" encoding="utf-8"?>
<math xmlns="http://www.w3.org/1998/Math/MathML" display="block">
  <mspace width="negativethinmathspace"/>
</math>
</file>