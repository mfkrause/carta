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automatic-styles>
 </office:automatic-styles>
  <office:body>
    <office:text>
      <text:p text:style-name="Text_20_body">Before the index.</text:p>
      <text:table-of-content text:name="Table of Contents1" text:protected="true">
        <text:table-of-content-source text:outline-level="10" text:use-outline-level="true"/>
        <text:index-body>
          <text:index-title text:name="Table of Contents1_Head">
            <text:p text:style-name="Text_20_body">Contents</text:p>
          </text:index-title>
          <text:p text:style-name="Text_20_body">Stale cached entry	1</text:p>
        </text:index-body>
      </text:table-of-content>
      <text:p text:style-name="Text_20_body">After the inde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dc="http://purl.org/dc/elements/1.1/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