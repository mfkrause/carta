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h text:style-name="Heading_20_1" text:outline-level="1">Alpha</text:h>
      <text:p text:style-name="Text_20_body">Intro.</text:p>
      <text:h text:style-name="Heading_20_2" text:outline-level="2">Beta Section</text:h>
      <text:h text:style-name="Heading_20_3" text:outline-level="3">Alph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