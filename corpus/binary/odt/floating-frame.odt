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/>
  <office:body>
    <office:text>
      <text:p text:style-name="Text_20_body">Real paragraph.</text:p>
      <draw:frame draw:name="Frame1" text:anchor-type="page" text:anchor-page-number="1" svg:width="2in" svg:height="1in" svg:x="1in" svg:y="1in">
        <draw:text-box>
          <text:p text:style-name="Text_20_body">Floating caption text.</text:p>
        </draw:text-box>
      </draw:frame>
      <text:p text:style-name="Text_20_body">After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Preformatted_20_Text" style:display-name="Preformatted Text" style:family="paragraph" style:parent-style-name="Standard"/>
    <style:style style:name="Source_20_Text" style:display-name="Source Text" style:family="text"/>
  </office:styles>
</office:document-styles>
</file>