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Formula-0/" manifest:media-type="application/vnd.oasis.opendocument.formula"/>
  <manifest:file-entry manifest:full-path="Formula-0/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/>
  <office:body>
    <office:text>
      <text:p text:style-name="Text_20_body">eq <draw:frame text:anchor-type="as-char" svg:width="1cm" svg:height="1cm"><draw:object xlink:href="./Formula-0"/><draw:image xlink:href="./ObjectReplacements/Formula-0"/></draw:frame>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/>
</office:document-styles>
</file>

<file path=Formula-0/content.xml><?xml version="1.0" encoding="utf-8"?>
<math xmlns="http://www.w3.org/1998/Math/MathML" display="block">
  <mi>E</mi>
  <mo>=</mo>
  <mi>m</mi>
  <msup>
    <mi>c</mi>
    <mn>2</mn>
  </msup>
</math>
</file>