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text:list-style style:name="L1">
      <text:list-level-style-bullet text:level="1" text:bullet-char="•"/>
    </text:list-style>
  </office:automatic-styles>
  <office:body>
    <office:text>
      <text:list text:style-name="L1">
        <text:list-item>
          <text:p text:style-name="Preformatted_20_Text">let x = 1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Preformatted_20_Text" style:display-name="Preformatted Text" style:family="paragraph" style:parent-style-name="Standard"/>
    <style:style style:name="Source_20_Text" style:display-name="Source Text" style:family="text"/>
  </office:styles>
</office:document-styles>
</file>