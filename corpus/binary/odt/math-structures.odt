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Formula-0/" manifest:media-type="application/vnd.oasis.opendocument.formula"/>
  <manifest:file-entry manifest:full-path="Formula-0/content.xml" manifest:media-type="text/xml"/>
  <manifest:file-entry manifest:full-path="Formula-1/" manifest:media-type="application/vnd.oasis.opendocument.formula"/>
  <manifest:file-entry manifest:full-path="Formula-1/content.xml" manifest:media-type="text/xml"/>
  <manifest:file-entry manifest:full-path="Formula-2/" manifest:media-type="application/vnd.oasis.opendocument.formula"/>
  <manifest:file-entry manifest:full-path="Formula-2/content.xml" manifest:media-type="text/xml"/>
  <manifest:file-entry manifest:full-path="Formula-3/" manifest:media-type="application/vnd.oasis.opendocument.formula"/>
  <manifest:file-entry manifest:full-path="Formula-3/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/>
  <office:body>
    <office:text>
      <text:p text:style-name="Text_20_body"><draw:frame text:anchor-type="as-char" svg:width="1cm" svg:height="1cm"><draw:object xlink:href="./Formula-0"/><draw:image xlink:href="./ObjectReplacements/Formula-0"/></draw:frame></text:p>
      <text:p text:style-name="Text_20_body"><draw:frame text:anchor-type="as-char" svg:width="1cm" svg:height="1cm"><draw:object xlink:href="./Formula-1"/><draw:image xlink:href="./ObjectReplacements/Formula-1"/></draw:frame></text:p>
      <text:p text:style-name="Text_20_body"><draw:frame text:anchor-type="as-char" svg:width="1cm" svg:height="1cm"><draw:object xlink:href="./Formula-2"/><draw:image xlink:href="./ObjectReplacements/Formula-2"/></draw:frame></text:p>
      <text:p text:style-name="Text_20_body"><draw:frame text:anchor-type="as-char" svg:width="1cm" svg:height="1cm"><draw:object xlink:href="./Formula-3"/><draw:image xlink:href="./ObjectReplacements/Formula-3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/>
</office:document-styles>
</file>

<file path=Formula-0/content.xml><?xml version="1.0" encoding="utf-8"?>
<math xmlns="http://www.w3.org/1998/Math/MathML" display="block">
  <mo>(</mo>
  <mtable>
    <mtr>
      <mtd>
        <mn>1</mn>
      </mtd>
      <mtd>
        <mn>0</mn>
      </mtd>
    </mtr>
    <mtr>
      <mtd>
        <mn>0</mn>
      </mtd>
      <mtd>
        <mn>1</mn>
      </mtd>
    </mtr>
  </mtable>
  <mo>)</mo>
</math>
</file>

<file path=Formula-1/content.xml><?xml version="1.0" encoding="utf-8"?>
<math xmlns="http://www.w3.org/1998/Math/MathML" display="block">
  <mmultiscripts>
    <mi>F</mi>
    <mn>1</mn>
    <mn>2</mn>
    <mprescripts/>
    <mn>3</mn>
    <mn>4</mn>
  </mmultiscripts>
</math>
</file>

<file path=Formula-2/content.xml><?xml version="1.0" encoding="utf-8"?>
<math xmlns="http://www.w3.org/1998/Math/MathML" display="block">
  <mi>a</mi>
  <mphantom>
    <mi>x</mi>
  </mphantom>
  <mi>b</mi>
</math>
</file>

<file path=Formula-3/content.xml><?xml version="1.0" encoding="utf-8"?>
<math xmlns="http://www.w3.org/1998/Math/MathML" display="block">
  <menclose notation="updiagonalstrike">
    <mrow>
      <mi>a</mi>
      <mo>+</mo>
      <mi>b</mi>
    </mrow>
  </menclose>
</math>
</file>